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fo:font-style="italic" style:font-style-asian="italic" style:font-style-complex="italic"/>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P9" style:parent-style-name="Normal" style:list-style-name="LFO2" style:family="paragraph"/>
    <style:style style:name="P10" style:parent-style-name="Normal" style:list-style-name="LFO2" style:family="paragraph"/>
    <style:style style:name="P11" style:parent-style-name="Normal" style:list-style-name="LFO2" style:family="paragraph"/>
    <style:style style:name="T12" style:parent-style-name="Policepardéfaut" style:family="text">
      <style:text-properties fo:font-weight="bold" style:font-weight-asian="bold" style:font-weight-complex="bold"/>
    </style:style>
    <style:style style:name="P13" style:parent-style-name="Normal" style:list-style-name="LFO3" style:family="paragraph"/>
    <style:style style:name="P14" style:parent-style-name="Normal" style:list-style-name="LFO3" style:family="paragraph"/>
    <style:style style:name="P15" style:parent-style-name="Normal" style:list-style-name="LFO3" style:family="paragraph"/>
    <style:style style:name="T16" style:parent-style-name="Policepardéfaut" style:family="text">
      <style:text-properties fo:font-weight="bold" style:font-weight-asian="bold" style:font-weight-complex="bold"/>
    </style:style>
    <style:style style:name="P17" style:parent-style-name="Normal" style:list-style-name="LFO4" style:family="paragraph"/>
    <style:style style:name="P18" style:parent-style-name="Normal" style:list-style-name="LFO4" style:family="paragraph"/>
    <style:style style:name="T19" style:parent-style-name="Policepardéfaut" style:family="text">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style:style>
    <style:style style:name="T22" style:parent-style-name="Policepardéfaut" style:family="text">
      <style:text-properties fo:font-weight="bold" style:font-weight-asian="bold" style:font-weight-complex="bold"/>
    </style:style>
    <style:style style:name="P23" style:parent-style-name="Normal" style:list-style-name="LFO5" style:family="paragraph"/>
    <style:style style:name="P24" style:parent-style-name="Normal" style:list-style-name="LFO5" style:family="paragraph"/>
    <style:style style:name="P25" style:parent-style-name="Normal" style:list-style-name="LFO5" style:family="paragraph"/>
    <style:style style:name="T26" style:parent-style-name="Policepardéfaut" style:family="text">
      <style:text-properties fo:font-weight="bold" style:font-weight-asian="bold" style:font-weight-complex="bold"/>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pan text:style-name="T2">1. Matching intelligent des virements bancaires</text:span><text:s/><text:span text:style-name="T3">(lié à la synchro)</text:span></text:p>
      <text:p text:style-name="Normal">C'est le cas d'usage le plus fort. Un proprio reçoit des virements avec des libellés chaotiques :</text:p>
      <text:list text:style-name="LFO1" text:continue-numbering="true">
        <text:list-item>
          <text:p text:style-name="P4">"VIR DUPONT M" → locataire Martin Dupont ✓</text:p>
        </text:list-item>
        <text:list-item>
          <text:p text:style-name="P5">"LOYER OCT APPT" → lequel des 3 apparts ?</text:p>
        </text:list-item>
        <text:list-item>
          <text:p text:style-name="P6">"MARTIN" → prénom seul, ambiguité</text:p>
        </text:list-item>
      </text:list>
      <text:p text:style-name="Normal">L'IA croise le montant, la date, le libellé et propose un matching avec un score de confiance. En dessous d'un seuil, elle demande confirmation. Au dessus, elle coche automatiquement et génère la quittance. C'est<text:s/><text:span text:style-name="T7">le cœur de ton avantage concurrentiel</text:span><text:s/>— Rentila ne fait pas ça.</text:p>
      <text:p text:style-name="Normal"><draw:custom-shape svg:x="0in" svg:y="0in" svg:width="45.51042in" svg:height="0.00139in" draw:z-index="0" draw:id="id0" draw:style-name="a0" draw:name="Horizontal Line 31" text:anchor-type="as-char"><svg:title/><svg:desc/><draw:enhanced-geometry draw:type="non-primitive" svg:viewBox="0 0 21600 21600" draw:enhanced-path="M 0 0 L 21600 0 21600 21600 0 21600 Z N"/></draw:custom-shape></text:p>
      <text:p text:style-name="Normal"><text:span text:style-name="T8">2. Détection des patterns de paiement</text:span></text:p>
      <text:p text:style-name="Normal">Après quelques mois de données, l'IA apprend les comportements :</text:p>
      <text:list text:style-name="LFO2" text:continue-numbering="true">
        <text:list-item>
          <text:p text:style-name="P9">"Dupont paie toujours entre le 5 et le 8 → ne pas envoyer de relance avant le 9"</text:p>
        </text:list-item>
        <text:list-item>
          <text:p text:style-name="P10">"Martin est en retard depuis 3 mois consécutifs → alerter le propriétaire proactivement"</text:p>
        </text:list-item>
        <text:list-item>
          <text:p text:style-name="P11">"Loyer de novembre non reçu alors que d'habitude il arrive le 2 → relance anticipée"</text:p>
        </text:list-item>
      </text:list>
      <text:p text:style-name="Normal">Le proprio ne configure rien — ça s'adapte tout seul. C'est ça qui est puissant.</text:p>
      <text:p text:style-name="Normal"><draw:custom-shape svg:x="0in" svg:y="0in" svg:width="45.51042in" svg:height="0.00139in" draw:z-index="0" draw:id="id1" draw:style-name="a1" draw:name="Horizontal Line 32" text:anchor-type="as-char"><svg:title/><svg:desc/><draw:enhanced-geometry draw:type="non-primitive" svg:viewBox="0 0 21600 21600" draw:enhanced-path="M 0 0 L 21600 0 21600 21600 0 21600 Z N"/></draw:custom-shape></text:p>
      <text:p text:style-name="Normal"><text:span text:style-name="T12">3. Rédaction intelligente des relances</text:span></text:p>
      <text:p text:style-name="Normal">Aujourd'hui tes relances sont des templates fixes. L'IA pourrait adapter le ton automatiquement selon le contexte :</text:p>
      <text:list text:style-name="LFO3" text:continue-numbering="true">
        <text:list-item>
          <text:p text:style-name="P13">Premier retard → ton neutre et bienveillant</text:p>
        </text:list-item>
        <text:list-item>
          <text:p text:style-name="P14">Deuxième retard consécutif → ton plus ferme</text:p>
        </text:list-item>
        <text:list-item>
          <text:p text:style-name="P15">Locataire habituellement fiable avec un retard isolé → ton compréhensif</text:p>
        </text:list-item>
      </text:list>
      <text:p text:style-name="Normal">Le proprio ne réfléchit plus à comment formuler — Loya choisit le bon ton.</text:p>
      <text:p text:style-name="Normal"><draw:custom-shape svg:x="0in" svg:y="0in" svg:width="45.51042in" svg:height="0.00139in" draw:z-index="0" draw:id="id2" draw:style-name="a2" draw:name="Horizontal Line 33" text:anchor-type="as-char"><svg:title/><svg:desc/><draw:enhanced-geometry draw:type="non-primitive" svg:viewBox="0 0 21600 21600" draw:enhanced-path="M 0 0 L 21600 0 21600 21600 0 21600 Z N"/></draw:custom-shape></text:p>
      <text:p text:style-name="Normal"><text:span text:style-name="T16">4. Analyse de rentabilité par bien</text:span></text:p>
      <text:p text:style-name="Normal">En croisant loyers perçus, retards, dépenses — l'IA génère un score de performance par bien :</text:p>
      <text:soft-page-break/>
      <text:list text:style-name="LFO4" text:continue-numbering="true">
        <text:list-item>
          <text:p text:style-name="P17">"Votre appartement rue de la Paix a un taux d'encaissement de 94% sur 12 mois"</text:p>
        </text:list-item>
        <text:list-item>
          <text:p text:style-name="P18">"Votre locataire rue du Faubourg coûte en moyenne 2,3 relances par trimestre"</text:p>
        </text:list-item>
      </text:list>
      <text:p text:style-name="Normal">Des insights que le proprio n'aurait jamais calculés manuellement.</text:p>
      <text:p text:style-name="Normal"><draw:custom-shape svg:x="0in" svg:y="0in" svg:width="45.51042in" svg:height="0.00139in" draw:z-index="0" draw:id="id3" draw:style-name="a3" draw:name="Horizontal Line 34" text:anchor-type="as-char"><svg:title/><svg:desc/><draw:enhanced-geometry draw:type="non-primitive" svg:viewBox="0 0 21600 21600" draw:enhanced-path="M 0 0 L 21600 0 21600 21600 0 21600 Z N"/></draw:custom-shape></text:p>
      <text:p text:style-name="Normal"><text:span text:style-name="T19">Ce que je te déconseille</text:span></text:p>
      <text:p text:style-name="Normal">Un chatbot "posez vos questions" dans l'interface — c'est ce que tout le monde fait, ça ne différencie pas, et ça coûte cher en tokens pour peu de valeur ajoutée réelle dans ton contexte.</text:p>
      <text:p text:style-name="Normal"><draw:custom-shape svg:x="0in" svg:y="0in" svg:width="45.51042in" svg:height="0.00139in" draw:z-index="0" draw:id="id4" draw:style-name="a4" draw:name="Horizontal Line 35" text:anchor-type="as-char"><svg:title/><svg:desc/><draw:enhanced-geometry draw:type="non-primitive" svg:viewBox="0 0 21600 21600" draw:enhanced-path="M 0 0 L 21600 0 21600 21600 0 21600 Z N"/></draw:custom-shape></text:p>
      <text:p text:style-name="Normal"><text:span text:style-name="T20">La séquence que je te suggère</text:span></text:p>
      <text:p text:style-name="Normal">Synchro bancaire → Matching IA des virements → Patterns de paiement → Score de rentabilité</text:p>
      <text:p text:style-name="Normal">Chaque étape utilise les données de la précédente. C'est une vraie plateforme data, pas des features empilées au hasard. Et c'est un territoire que ni BailFacile ni Rentila n'occupent vraiment.</text:p>
      <text:p text:style-name="Normal"><text:line-break/><text:line-break/><text:span text:style-name="T21">Ce que l'IA peut faire de façon réaliste ici</text:span></text:p>
      <text:p text:style-name="Normal">Le locataire dépose un justificatif de paiement une fois que le virement est fait<text:s/></text:p>
      <text:p text:style-name="Normal">Pas détecter le faux, mais<text:s/><text:span text:style-name="T22">extraire les informations</text:span><text:s/>du justificatif :</text:p>
      <text:list text:style-name="LFO5" text:continue-numbering="true">
        <text:list-item>
          <text:p text:style-name="P23">Montant</text:p>
        </text:list-item>
        <text:list-item>
          <text:p text:style-name="P24">Date</text:p>
        </text:list-item>
        <text:list-item>
          <text:p text:style-name="P25">Nom du bénéficiaire</text:p>
        </text:list-item>
      </text:list>
      <text:p text:style-name="Normal">Et vérifier que ça correspond au loyer attendu. Si ça colle → notification au propriétaire "probable paiement reçu, vérifiez votre banque". C'est honnête, utile, et techniquement faisable avec l'API Claude vision.</text:p>
      <text:p text:style-name="Normal">Mais la validation finale reste humaine — le propriétaire confirme en un clic.</text:p>
      <text:p text:style-name="Normal"><text:line-break/>Une fois que l’appli est bien avancé :<text:s/><text:span text:style-name="T26">Product Hunt</text:span><text:s/>— quand tu te sens prêt, un lancement Product Hunt bien préparé peut t'apporter 200-500 utilisateurs en 24h gratuite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anny LE SEACH (M1_BREST)</meta:initial-creator>
    <dc:creator>Fanny LE SEACH (M1_BREST)</dc:creator>
    <meta:creation-date>2026-06-29T13:24:00Z</meta:creation-date>
    <dc:date>2026-06-29T20:18:00Z</dc:date>
    <meta:template xlink:href="Normal.dotm" xlink:type="simple"/>
    <meta:editing-cycles>2</meta:editing-cycles>
    <meta:editing-duration>PT19680S</meta:editing-duration>
    <meta:document-statistic meta:page-count="2" meta:paragraph-count="5" meta:word-count="458" meta:character-count="2978" meta:row-count="21" meta:non-whitespace-character-count="2525"/>
  </office:meta>
</office:document-meta>
</file>